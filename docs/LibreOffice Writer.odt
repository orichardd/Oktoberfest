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da84" officeooo:paragraph-rsid="000ada84" style:font-size-asian="20pt" style:font-size-complex="20pt"/>
    </style:style>
    <style:style style:name="P2" style:family="paragraph" style:parent-style-name="Standard">
      <style:text-properties fo:font-size="15pt" officeooo:rsid="000ada84" officeooo:paragraph-rsid="000ada84" fo:background-color="transparent" style:font-size-asian="15pt" style:font-size-complex="15pt"/>
    </style:style>
    <style:style style:name="P3" style:family="paragraph" style:parent-style-name="Standard">
      <style:text-properties fo:font-size="15pt" officeooo:rsid="000ada84" officeooo:paragraph-rsid="000ada84" style:font-size-asian="13.1000003814697pt" style:font-size-complex="15pt"/>
    </style:style>
    <style:style style:name="P4" style:family="paragraph" style:parent-style-name="Standard">
      <style:text-properties fo:font-size="12pt" officeooo:rsid="000ada84" officeooo:paragraph-rsid="000ada8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ão de funcinários Oktoberfest 2026</text:p>
      <text:p text:style-name="P2">Igrejinha, Rio Grande do Sul, Brasil</text:p>
      <text:p text:style-name="P3">Desenvolvimento e produção: Richard Almeida</text:p>
      <text:p text:style-name="P3">Suporte: Miguel Fulber Gomes</text:p>
      <text:p text:style-name="P3"/>
      <text:p text:style-name="P3">Objetivo:</text:p>
      <text:p text:style-name="P4">O sistema tem como objetiv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6.2.2.2$Linux_X86_64 LibreOffice_project/620$Build-2</meta:generator>
    <dc:date>2026-07-06T22:07:25.947552722</dc:date>
    <meta:editing-duration>PT6M16S</meta:editing-duration>
    <meta:editing-cycles>1</meta:editing-cycles>
    <meta:document-statistic meta:table-count="0" meta:image-count="0" meta:object-count="0" meta:page-count="1" meta:paragraph-count="6" meta:word-count="26" meta:character-count="182" meta:non-whitespace-character-count="161"/>
  </office:meta>
</office:document-meta>
</file>